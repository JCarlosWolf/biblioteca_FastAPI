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🧠 PROYECTO FASTAPI BIBLIOTECA – GUÍA COMPLETA PASO A PASO (Backend REST con MySQL)</text:p>
      <text:p text:style-name="Standard">====================================================================================</text:p>
      <text:p text:style-name="Standard"/>
      <text:p text:style-name="Standard">👋 **Bienvenida**</text:p>
      <text:p text:style-name="Standard">-----------------</text:p>
      <text:p text:style-name="Standard">Construiremos un **backend REST** con **FastAPI** para una **Biblioteca Personal** 📚. <text:s/></text:p>
      <text:p text:style-name="Standard">El objetivo es crear una **API RESTful completa** (CRUD) usando:</text:p>
      <text:p text:style-name="Standard"/>
      <text:p text:style-name="Standard">- **FastAPI** para exponer endpoints.</text:p>
      <text:p text:style-name="Standard">- **SQLAlchemy + Alembic** para acceso a datos y migraciones.</text:p>
      <text:p text:style-name="Standard">- **MySQL** como base de datos.</text:p>
      <text:p text:style-name="Standard">- **Pydantic** para validaciones de entrada/salida.</text:p>
      <text:p text:style-name="Standard">- **CORS** configurado para permitir consumo desde Angular/React.</text:p>
      <text:p text:style-name="Standard">- Ejecución final en **http://localhost:8080/api/libros**.</text:p>
      <text:p text:style-name="Standard"/>
      <text:p text:style-name="Standard">Cada fase incluye:</text:p>
      <text:p text:style-name="Standard">- 🔍 **Por qué** (contexto)</text:p>
      <text:p text:style-name="Standard">- 🧱 **Qué hacer** (instrucciones para generar código y archivos)</text:p>
      <text:p text:style-name="Standard">- 💡 **Tips** (buenas prácticas / errores comunes en FastAPI)</text:p>
      <text:p text:style-name="Standard"/>
      <text:p text:style-name="Standard">&gt; Las respuestas deben generar **archivos completos listos para copiar y pegar**, nunca fragmentos sueltos.</text:p>
      <text:p text:style-name="Standard"/>
      <text:p text:style-name="Standard">---</text:p>
      <text:p text:style-name="Standard"/>
      <text:p text:style-name="Standard">📣 INSTRUCCIONES GENERALES</text:p>
      <text:p text:style-name="Standard">---------------------------</text:p>
      <text:p text:style-name="Standard">⚠️ MODO INTERACTIVO ESTRICTO (POR FASES)</text:p>
      <text:p text:style-name="Standard"/>
      <text:p text:style-name="Standard">REGLAS DE AVANCE POR FASES</text:p>
      <text:p text:style-name="Standard">1) Muestra EXACTAMENTE **una sola fase por respuesta**.</text:p>
      <text:p text:style-name="Standard">2) **No anticipes** fases futuras, ni listados, ni resúmenes de lo que viene.</text:p>
      <text:p text:style-name="Standard">3) Finaliza SIEMPRE con una línea de cierre que indique dónde estamos y qué sigue, por ejemplo: <text:s/></text:p>
      <text:p text:style-name="Standard"><text:s text:c="3"/>👉 `¿Continuamos? Responde: **listo** para la siguiente fase (Fase X).`</text:p>
      <text:p text:style-name="Standard">4) Solo avanza cuando el usuario escriba la palabra **listo**:</text:p>
      <text:p text:style-name="Standard"><text:s text:c="3"/>- Si el usuario escribe `listo fase X`, muestra la **Fase X**.</text:p>
      <text:p text:style-name="Standard"><text:s text:c="3"/>- Si el usuario solo escribe `listo`, muestra la **siguiente fase secuencial** e indica claramente cuál es.</text:p>
      <text:p text:style-name="Standard">5) Si el usuario hace una pregunta fuera de la guía, respóndela brevemente y termina con: <text:s/></text:p>
      <text:p text:style-name="Standard"><text:s text:c="3"/>👉 `¿Retomamos la guía? Escribe: **listo** para continuar desde la Fase X.` <text:s/></text:p>
      <text:p text:style-name="Standard"><text:s text:c="3"/>(indica siempre en qué fase va).</text:p>
      <text:p text:style-name="Standard">6) No incluyas código de fases posteriores ni “sneak peeks”.</text:p>
      <text:p text:style-name="Standard">7) Cada paso debe indicar **ruta + nombre del archivo** y si es **(NUEVO)** o **(MODIFICADO)**.</text:p>
      <text:p text:style-name="Standard">8) Usa comentarios `# [NUEVO]` y `# [MODIFICADO]` **solo** cuando agregues o cambies líneas en **archivos ya existentes**. <text:s/></text:p>
      <text:p text:style-name="Standard"><text:s text:c="3"/>👉 En **archivos nuevos**, **no** uses esas marcas. <text:s/></text:p>
      <text:p text:style-name="Standard"><text:s text:c="3"/>👉 Si todo el método es nuevo o modificado, marca solo al inicio del método con `# [NUEVO]` para no marcar cada línea de método.</text:p>
      <text:p text:style-name="Standard"><text:soft-page-break/>9) Agrega comentarios claros en el código explicando qué hace cada bloque / función importante.</text:p>
      <text:p text:style-name="Standard">10) Si detectas que ya mostraste una fase, **no la repitas** a menos que el usuario pida explícitamente: `repetir fase X`.</text:p>
      <text:p text:style-name="Standard"/>
      <text:p text:style-name="Standard">---</text:p>
      <text:p text:style-name="Standard"/>
      <text:p text:style-name="Standard">🎯 CONTEXTO DEL SISTEMA</text:p>
      <text:p text:style-name="Standard">------------------------</text:p>
      <text:p text:style-name="Standard">**Sistema: Biblioteca Personal** 📚 <text:s/></text:p>
      <text:p text:style-name="Standard">Se administrará un catálogo de libros personales, con posibilidad de consultar, agregar, editar y eliminar libros.</text:p>
      <text:p text:style-name="Standard"/>
      <text:p text:style-name="Standard">---</text:p>
      <text:p text:style-name="Standard"/>
      <text:p text:style-name="Standard">📊 ESTRUCTURA DE DATOS</text:p>
      <text:p text:style-name="Standard">-----------------------</text:p>
      <text:p text:style-name="Standard">Tabla principal: `libros`</text:p>
      <text:p text:style-name="Standard"/>
      <text:p text:style-name="Standard">Campos:</text:p>
      <text:p text:style-name="Standard"/>
      <text:p text:style-name="Standard">- `id` → Entero, **llave primaria autoincremental**</text:p>
      <text:p text:style-name="Standard">- `titulo` → Cadena de texto, **obligatorio**</text:p>
      <text:p text:style-name="Standard">- `autor` → Cadena de texto, **obligatorio**</text:p>
      <text:p text:style-name="Standard">- `rating` → Entero, **obligatorio**, con valor entre **1 y 5**</text:p>
      <text:p text:style-name="Standard"/>
      <text:p text:style-name="Standard">Validaciones mínimas:</text:p>
      <text:p text:style-name="Standard"/>
      <text:p text:style-name="Standard">- `titulo` y `autor` no pueden estar vacíos.</text:p>
      <text:p text:style-name="Standard">- `rating` debe ser un entero entre 1 y 5 (inclusive).</text:p>
      <text:p text:style-name="Standard"/>
      <text:p text:style-name="Standard">---</text:p>
      <text:p text:style-name="Standard"/>
      <text:p text:style-name="Standard">⚙️ TECNOLOGÍAS USADAS</text:p>
      <text:p text:style-name="Standard">----------------------</text:p>
      <text:p text:style-name="Standard">- **FastAPI** → Framework web para construir APIs rápidas y tipadas.</text:p>
      <text:p text:style-name="Standard">- **Uvicorn** → Servidor ASGI para ejecutar FastAPI.</text:p>
      <text:p text:style-name="Standard">- **SQLAlchemy** → ORM para modelar y consultar MySQL.</text:p>
      <text:p text:style-name="Standard">- **Alembic** → Migraciones automáticas del esquema.</text:p>
      <text:p text:style-name="Standard">- **Pydantic** → Modelos de validación para requests/responses.</text:p>
      <text:p text:style-name="Standard">- **python-dotenv** → Carga de variables de entorno desde `.env`.</text:p>
      <text:p text:style-name="Standard">- **PyMySQL** → Conector MySQL.</text:p>
      <text:p text:style-name="Standard">- **MySQL** → Base de datos relacional.</text:p>
      <text:p text:style-name="Standard">- **CORS Middleware** de FastAPI → Para permitir acceso desde Angular/React.</text:p>
      <text:p text:style-name="Standard"/>
      <text:p text:style-name="Standard">---</text:p>
      <text:p text:style-name="Standard"/>
      <text:p text:style-name="Standard">🧱 ESTRUCTURA BASE DEL PROYECTO</text:p>
      <text:p text:style-name="Standard">-------------------------------</text:p>
      <text:p text:style-name="Standard">Ruta sugerida en Windows:</text:p>
      <text:p text:style-name="Standard"/>
      <text:p text:style-name="Standard">- `C:\Cursos\FastAPI\biblioteca_fastapi\`</text:p>
      <text:p text:style-name="Standard"/>
      <text:p text:style-name="Standard"><text:soft-page-break/>Estructura objetivo (se construirá fase por fase):</text:p>
      <text:p text:style-name="Standard"/>
      <text:p text:style-name="Standard">- `biblioteca_fastapi\`</text:p>
      <text:p text:style-name="Standard"><text:s text:c="2"/>- `main.py`</text:p>
      <text:p text:style-name="Standard"><text:s text:c="2"/>- `database.py`</text:p>
      <text:p text:style-name="Standard"><text:s text:c="2"/>- `models\`</text:p>
      <text:p text:style-name="Standard"><text:s text:c="4"/>- `libro.py`</text:p>
      <text:p text:style-name="Standard"><text:s text:c="2"/>- `schemas.py`</text:p>
      <text:p text:style-name="Standard"><text:s text:c="2"/>- `.env`</text:p>
      <text:p text:style-name="Standard"><text:s text:c="2"/>- `alembic.ini`</text:p>
      <text:p text:style-name="Standard"><text:s text:c="2"/>- `alembic\` (carpeta generada por Alembic)</text:p>
      <text:p text:style-name="Standard"><text:s text:c="2"/>- `services\`</text:p>
      <text:p text:style-name="Standard"><text:s text:c="4"/>- `libro_service.py`</text:p>
      <text:p text:style-name="Standard"><text:s text:c="2"/>- `api\`</text:p>
      <text:p text:style-name="Standard"><text:s text:c="4"/>- `libros.py`</text:p>
      <text:p text:style-name="Standard"/>
      <text:p text:style-name="Standard">La API deberá exponer los endpoints bajo el prefijo:</text:p>
      <text:p text:style-name="Standard"/>
      <text:p text:style-name="Standard">- `http://localhost:8080/api/libros`</text:p>
      <text:p text:style-name="Standard"/>
      <text:p text:style-name="Standard">(no usar autenticación ni paginación en este proyecto).</text:p>
      <text:p text:style-name="Standard"/>
      <text:p text:style-name="Standard">---</text:p>
      <text:p text:style-name="Standard"/>
      <text:p text:style-name="Standard">💾 CONFIGURACIÓN DE BASE DE DATOS</text:p>
      <text:p text:style-name="Standard">----------------------------------</text:p>
      <text:p text:style-name="Standard">Base de datos en MySQL (sugerida):</text:p>
      <text:p text:style-name="Standard"/>
      <text:p text:style-name="Standard">- Nombre: `biblioteca_db`</text:p>
      <text:p text:style-name="Standard">- Usuario: `root`</text:p>
      <text:p text:style-name="Standard">- Contraseña: `admin`</text:p>
      <text:p text:style-name="Standard">- Host: `localhost`</text:p>
      <text:p text:style-name="Standard">- Puerto: `3306`</text:p>
      <text:p text:style-name="Standard"/>
      <text:p text:style-name="Standard">Archivo **`.env`** debe almacenar estas variables (sin exponerlas en repos públicos). <text:s/></text:p>
      <text:p text:style-name="Standard">La URL de conexión seguirá el formato:</text:p>
      <text:p text:style-name="Standard"/>
      <text:p text:style-name="Standard">- `mysql+pymysql://usuario:password@host:puerto/base_de_datos`</text:p>
      <text:p text:style-name="Standard"/>
      <text:p text:style-name="Standard">---</text:p>
      <text:p text:style-name="Standard"/>
      <text:p text:style-name="Standard">📦 RESUMEN VISUAL DE ARCHIVOS EN CADA FASE</text:p>
      <text:p text:style-name="Standard">--------------------------------------------</text:p>
      <text:p text:style-name="Standard">Despues de explicar de que trata **cada fase**, genera un bloque con el título:</text:p>
      <text:p text:style-name="Standard"/>
      <text:p text:style-name="Standard">📁 NUEVOS ARCHIVOS / MODIFICACIONES</text:p>
      <text:p text:style-name="Standard"/>
      <text:p text:style-name="Standard">Debe mostrar la **estructura del proyecto en formato árbol** (`│ ├── └──`) indicando:</text:p>
      <text:p text:style-name="Standard"/>
      <text:p text:style-name="Standard">- Los **archivos nuevos** con la etiqueta **(NUEVO)** <text:s/></text:p>
      <text:p text:style-name="Standard">- Los **archivos modificados** con la etiqueta **(MODIFICADO)** <text:s/></text:p>
      <text:p text:style-name="Standard">- Mantén el nombre del proyecto en la raíz, por ejemplo: `biblioteca_fastapi/` <text:s/></text:p>
      <text:p text:style-name="Standard"><text:soft-page-break/>- Usa estilo visual limpio, alineado y con emojis si aplica.</text:p>
      <text:p text:style-name="Standard"/>
      <text:p text:style-name="Standard">&gt; Este bloque debe aparecer **despues del titulo y la explicacion general de cada fase**, <text:s/></text:p>
      <text:p text:style-name="Standard">&gt; para identificar rápidamente qué archivos se crearán o modificarán.</text:p>
      <text:p text:style-name="Standard"/>
      <text:p text:style-name="Standard">---</text:p>
      <text:p text:style-name="Standard"/>
      <text:p text:style-name="Standard">==================================================</text:p>
      <text:p text:style-name="Standard">🚀 FASES DEL PROYECTO (BACKEND FASTAPI)</text:p>
      <text:p text:style-name="Standard">==================================================</text:p>
      <text:p text:style-name="Standard"/>
      <text:p text:style-name="Standard"/>
      <text:p text:style-name="Standard">### 🎯 FASE 1: CREACIÓN DEL PROYECTO Y ENTORNO VIRTUAL</text:p>
      <text:p text:style-name="Standard"/>
      <text:p text:style-name="Standard">**Por qué:** Definir una estructura clara desde el inicio y un entorno aislado para el backend.</text:p>
      <text:p text:style-name="Standard"/>
      <text:p text:style-name="Standard">**Qué hacer:**</text:p>
      <text:p text:style-name="Standard"/>
      <text:p text:style-name="Standard">- Crear la carpeta base del proyecto:</text:p>
      <text:p text:style-name="Standard"><text:s text:c="2"/>- Ruta: `C:\Cursos\FastAPI\biblioteca_fastapi\`</text:p>
      <text:p text:style-name="Standard"/>
      <text:p text:style-name="Standard">- Crear y activar un entorno virtual para el proyecto.</text:p>
      <text:p text:style-name="Standard"/>
      <text:p text:style-name="Standard">- Actualizar la herramienta de pip:</text:p>
      <text:p text:style-name="Standard"><text:s text:c="2"/>- `python.exe -m pip install --upgrade pip`</text:p>
      <text:p text:style-name="Standard"/>
      <text:p text:style-name="Standard">- Instalar dependencias mínimas (indicando los comandos a ejecutar en la consola de Windows):</text:p>
      <text:p text:style-name="Standard"><text:s text:c="2"/>- `fastapi`</text:p>
      <text:p text:style-name="Standard"><text:s text:c="2"/>- `uvicorn[standard]`</text:p>
      <text:p text:style-name="Standard"><text:s text:c="2"/>- `SQLAlchemy`</text:p>
      <text:p text:style-name="Standard"><text:s text:c="2"/>- `Alembic`</text:p>
      <text:p text:style-name="Standard"><text:s text:c="2"/>- `python-dotenv`</text:p>
      <text:p text:style-name="Standard"><text:s text:c="2"/>- `PyMySQL`</text:p>
      <text:p text:style-name="Standard"><text:s text:c="2"/>- `cryptography`</text:p>
      <text:p text:style-name="Standard"/>
      <text:p text:style-name="Standard">- Verificar que el entorno quede correctamente asociado en el IDE (por ejemplo, PyCharm).</text:p>
      <text:p text:style-name="Standard"/>
      <text:p text:style-name="Standard">💡 Tips (explicativos, sin código de FastAPI todavía):</text:p>
      <text:p text:style-name="Standard">- Explicar brevemente qué es FastAPI y por qué se usa.</text:p>
      <text:p text:style-name="Standard">- Explicar por qué es importante usar entorno virtual. (opcional por que vamos a trabajar con PyCharm)</text:p>
      <text:p text:style-name="Standard">- Señalar cómo comprobar que las dependencias se instalaron bien (opcional)</text:p>
      <text:p text:style-name="Standard"/>
      <text:p text:style-name="Standard">👉 Al final de esta fase **NO** debe haber archivos Python creados aún, solo el entorno configurado.</text:p>
      <text:p text:style-name="Standard"/>
      <text:p text:style-name="Standard">Termina la respuesta con: <text:s/></text:p>
      <text:p text:style-name="Standard">`¿Continuamos? Responde: **listo** para la Fase 2 (estructura base y primera app).`</text:p>
      <text:p text:style-name="Standard"/>
      <text:p text:style-name="Standard"/>
      <text:p text:style-name="Standard">---</text:p>
      <text:p text:style-name="Standard"/>
      <text:p text:style-name="Standard"><text:soft-page-break/>### 🧩 FASE 2: ESTRUCTURA BASE Y APLICACIÓN FASTAPI INICIAL</text:p>
      <text:p text:style-name="Standard"/>
      <text:p text:style-name="Standard">**Por qué:** Tener un punto de entrada `main.py` con una instancia de FastAPI y un endpoint de prueba.</text:p>
      <text:p text:style-name="Standard"/>
      <text:p text:style-name="Standard">**Qué hacer:**</text:p>
      <text:p text:style-name="Standard"/>
      <text:p text:style-name="Standard">- **Archivo (NUEVO): `C:\Cursos\FastAPI\biblioteca_fastapi\main.py`** <text:s/></text:p>
      <text:p text:style-name="Standard"><text:s text:c="2"/>👉 Genera el archivo completo `main.py`, listo para copiar y pegar, que incluya:</text:p>
      <text:p text:style-name="Standard"/>
      <text:p text:style-name="Standard"><text:s text:c="2"/>- Creación de la instancia de `FastAPI`.</text:p>
      <text:p text:style-name="Standard"><text:s text:c="2"/>- Un endpoint de prueba simple (por ejemplo `/`) que devuelva un JSON sencillo indicando que la API está viva.</text:p>
      <text:p text:style-name="Standard"><text:s text:c="2"/>- Comentarios claros explicando:</text:p>
      <text:p text:style-name="Standard"><text:s text:c="4"/>- Qué es la instancia `app`.</text:p>
      <text:p text:style-name="Standard"><text:s text:c="4"/>- Qué hace el endpoint de prueba.</text:p>
      <text:p text:style-name="Standard"/>
      <text:p text:style-name="Standard">- Indicar al alumno cómo ejecutar la app **en el puerto por defecto (8000)** usando `uvicorn` desde la línea de comandos.</text:p>
      <text:p text:style-name="Standard"/>
      <text:p text:style-name="Standard">- Explicar cómo probar el endpoint inicial desde el navegador o con `curl/Postman`.</text:p>
      <text:p text:style-name="Standard"/>
      <text:p text:style-name="Standard">💡 Tips:</text:p>
      <text:p text:style-name="Standard">- No configurar CORS ni rutas de negocio todavía.</text:p>
      <text:p text:style-name="Standard">- Mencionar la URL típica de documentación automática de FastAPI (`/docs`).</text:p>
      <text:p text:style-name="Standard"/>
      <text:p text:style-name="Standard">Termina la respuesta con: <text:s/></text:p>
      <text:p text:style-name="Standard">`¿Continuamos? Responde: **listo** para la Fase 3 (conexión con MySQL y .env).`</text:p>
      <text:p text:style-name="Standard"/>
      <text:p text:style-name="Standard"/>
      <text:p text:style-name="Standard">---</text:p>
      <text:p text:style-name="Standard"/>
      <text:p text:style-name="Standard">### 🧩 FASE 3: CONEXIÓN CON MYSQL Y ARCHIVO `.env`</text:p>
      <text:p text:style-name="Standard"/>
      <text:p text:style-name="Standard">**Por qué:** Tener un motor de BD listo con credenciales seguras y centralizadas.</text:p>
      <text:p text:style-name="Standard"/>
      <text:p text:style-name="Standard">**Qué hacer:**</text:p>
      <text:p text:style-name="Standard"/>
      <text:p text:style-name="Standard">- Crear la base de datos `biblioteca_db` en MySQL (por ejemplo, desde MySQL Workbench).</text:p>
      <text:p text:style-name="Standard"/>
      <text:p text:style-name="Standard">- **Archivo (NUEVO): `C:\Cursos\FastAPI\biblioteca_fastapi\.env`** <text:s/></text:p>
      <text:p text:style-name="Standard"><text:s text:c="2"/>👉 Generar el contenido completo del `.env` con las variables de conexión a MySQL (usuario, contraseña, host, puerto, nombre de BD), listo para copiar y pegar.</text:p>
      <text:p text:style-name="Standard"/>
      <text:p text:style-name="Standard">- **Archivo (NUEVO): `C:\Cursos\FastAPI\biblioteca_fastapi\database.py`** <text:s/></text:p>
      <text:p text:style-name="Standard"><text:s text:c="2"/>👉 Generar el archivo completo `database.py` que:</text:p>
      <text:p text:style-name="Standard"/>
      <text:p text:style-name="Standard"><text:s text:c="2"/>- Cargue las variables de entorno con `python-dotenv`.</text:p>
      <text:p text:style-name="Standard"><text:s text:c="2"/>- Construya la URL de conexión a MySQL con `PyMySQL` en el formato correcto.</text:p>
      <text:p text:style-name="Standard"><text:s text:c="2"/>- Cree:</text:p>
      <text:p text:style-name="Standard"><text:s text:c="4"/>- `engine`</text:p>
      <text:p text:style-name="Standard"><text:s text:c="4"/>- `SessionLocal` con `sessionmaker`</text:p>
      <text:p text:style-name="Standard"><text:soft-page-break/><text:s text:c="4"/>- `Base` con `declarative_base()`</text:p>
      <text:p text:style-name="Standard"><text:s text:c="2"/>- Defina una **dependencia** `get_db()` para FastAPI que:</text:p>
      <text:p text:style-name="Standard"><text:s text:c="4"/>- Abra una sesión por petición.</text:p>
      <text:p text:style-name="Standard"><text:s text:c="4"/>- Cierre la sesión siempre (uso de `try/finally`).</text:p>
      <text:p text:style-name="Standard"><text:s text:c="2"/>- Incluya una **prueba rápida de conexión** ejecutable con `python database.py` (sin usar `SELECT` explícito, solo abriendo una conexión y mostrando un mensaje de éxito o error).</text:p>
      <text:p text:style-name="Standard"/>
      <text:p text:style-name="Standard">- Explicar brevemente qué hace cada parte del archivo `database.py`.</text:p>
      <text:p text:style-name="Standard"/>
      <text:p text:style-name="Standard">💡 Tips:</text:p>
      <text:p text:style-name="Standard">- Aclarar que **no** se deben quemar credenciales en el código, sino usar `.env`.</text:p>
      <text:p text:style-name="Standard">- Explicar por qué se usa una dependencia `get_db()` en FastAPI.</text:p>
      <text:p text:style-name="Standard"/>
      <text:p text:style-name="Standard">Termina la respuesta con: <text:s/></text:p>
      <text:p text:style-name="Standard">`¿Continuamos? Responde: **listo** para la Fase 4 (modelo Libro y configuración de Alembic).`</text:p>
      <text:p text:style-name="Standard"/>
      <text:p text:style-name="Standard"/>
      <text:p text:style-name="Standard">---</text:p>
      <text:p text:style-name="Standard"/>
      <text:p text:style-name="Standard">### 📚 FASE 4: MODELO `Libro` EN CARPETA `models`</text:p>
      <text:p text:style-name="Standard"/>
      <text:p text:style-name="Standard">**Por qué:** Modelar la tabla `libros` con SQLAlchemy de forma organizada, usando un paquete `models`.</text:p>
      <text:p text:style-name="Standard"/>
      <text:p text:style-name="Standard">**Qué hacer (explicación general):**</text:p>
      <text:p text:style-name="Standard"/>
      <text:p text:style-name="Standard">En esta fase se creará la carpeta `models` y el archivo `libro.py` con la clase `Libro`.</text:p>
      <text:p text:style-name="Standard"/>
      <text:p text:style-name="Standard">👉 Genera el archivo completo `libro.py` que:</text:p>
      <text:p text:style-name="Standard"><text:s text:c="2"/></text:p>
      <text:p text:style-name="Standard"><text:s text:c="2"/>- Importe `Base` desde `database.py`.</text:p>
      <text:p text:style-name="Standard"><text:s text:c="2"/>- Defina la clase `Libro` heredando de `Base`.</text:p>
      <text:p text:style-name="Standard"><text:s text:c="2"/>- Configure el nombre de la tabla como `libros`.</text:p>
      <text:p text:style-name="Standard"><text:s text:c="2"/>- Declare las columnas:</text:p>
      <text:p text:style-name="Standard"><text:s text:c="4"/>- `id` (entero, PK, autoincremental).</text:p>
      <text:p text:style-name="Standard"><text:s text:c="4"/>- `titulo` (cadena, requerido).</text:p>
      <text:p text:style-name="Standard"><text:s text:c="4"/>- `autor` (cadena, requerido).</text:p>
      <text:p text:style-name="Standard"><text:s text:c="4"/>- `rating` (entero, requerido, 1–5).</text:p>
      <text:p text:style-name="Standard"/>
      <text:p text:style-name="Standard"><text:s text:c="2"/>- Incluya comentarios explicando cada atributo importante.</text:p>
      <text:p text:style-name="Standard"><text:s text:c="2"/></text:p>
      <text:p text:style-name="Standard">💡 Tips:</text:p>
      <text:p text:style-name="Standard">- Explicar brevemente la diferencia entre el paquete `models` y cada archivo de modelo individual.</text:p>
      <text:p text:style-name="Standard">- Mencionar la importancia de mantener los modelos organizados en una carpeta.</text:p>
      <text:p text:style-name="Standard">- Aun no incluir configuracion de alembic, eso se vera en la siguiente fase </text:p>
      <text:p text:style-name="Standard"/>
      <text:p text:style-name="Standard"/>
      <text:p text:style-name="Standard">### 🧱 FASE 5 — INICIAR ALEMBIC + GENERAR MIGRACIONES</text:p>
      <text:p text:style-name="Standard"/>
      <text:p text:style-name="Standard">**Por qué:** Sincronizar el modelo `Libro` con la base de datos `biblioteca_db` usando migraciones versionadas.</text:p>
      <text:p text:style-name="Standard"><text:s text:c="2"/></text:p>
      <text:p text:style-name="Standard"><text:soft-page-break/>**Qué hacer:**</text:p>
      <text:p text:style-name="Standard">1) Inicializar Alembic: `alembic init alembic` (verificar `alembic\` y `alembic.ini`).</text:p>
      <text:p text:style-name="Standard">2) Configurar `alembic.ini`: ajustar `sqlalchemy.url` con la URL de la BD.</text:p>
      <text:p text:style-name="Standard">**Busca exactamente la línea:**</text:p>
      <text:p text:style-name="Standard">sqlalchemy.url = driver://user:pass@localhost/dbname</text:p>
      <text:p text:style-name="Standard">**Reemplázala COMPLETAMENTE por esta URL lista para copiar y pegar:**</text:p>
      <text:p text:style-name="Standard">sqlalchemy.url = mysql+pymysql://root:admin@localhost:3306/biblioteca_db</text:p>
      <text:p text:style-name="Standard">3) Editar `alembic\env.py`:</text:p>
      <text:p text:style-name="Standard"><text:s text:c="2"/>- Instruir para:</text:p>
      <text:p text:style-name="Standard"><text:s text:c="4"/>- Importar `Base` y los modelos (`from database import Base` y el import adecuado de `models`).</text:p>
      <text:p text:style-name="Standard"><text:s text:c="4"/>- Asignar `target_metadata = Base.metadata`.</text:p>
      <text:p text:style-name="Standard">Luego **busca esta línea**:</text:p>
      <text:p text:style-name="Standard"><text:s text:c="3"/>- `target_metadata = Base.metadata`</text:p>
      <text:p text:style-name="Standard">**Reemplázala por:**</text:p>
      <text:p text:style-name="Standard"><text:s text:c="3"/>- target_metadata = Base.metadata</text:p>
      <text:p text:style-name="Standard">4) **Archivo (NUEVO): `migrate.py`** (automatizar) (debes generar el archivo con lo siguiente): <text:s/></text:p>
      <text:p text:style-name="Standard"><text:s text:c="3"/>- Cargar `.env`. <text:s/></text:p>
      <text:p text:style-name="Standard"><text:s text:c="3"/>- Detectar y limpiar **alembic_version** huérfana si aplica. <text:s/></text:p>
      <text:p text:style-name="Standard"><text:s text:c="3"/>- Generar revisión autogenerada y aplicar **upgrade head**. <text:s/></text:p>
      <text:p text:style-name="Standard">5) Ejecutar `python migrate.py` y verificar tabla **libros** en MySQL.</text:p>
      <text:p text:style-name="Standard"><text:s text:c="2"/></text:p>
      <text:p text:style-name="Standard">💡 Tips:</text:p>
      <text:p text:style-name="Standard">- Explicar por qué Alembic es mejor que crear tablas “a mano”.</text:p>
      <text:p text:style-name="Standard">- Mencionar errores comunes (como olvidar importar los modelos en `env.py`).</text:p>
      <text:p text:style-name="Standard"/>
      <text:p text:style-name="Standard">Termina la respuesta con: <text:s/></text:p>
      <text:p text:style-name="Standard">`¿Continuamos? Responde: **listo** para la Fase 5 (esquemas Pydantic y validaciones).`</text:p>
      <text:p text:style-name="Standard"/>
      <text:p text:style-name="Standard"/>
      <text:p text:style-name="Standard">---</text:p>
      <text:p text:style-name="Standard"/>
      <text:p text:style-name="Standard">### 🧾 FASE 6: ESQUEMAS Pydantic Y VALIDACIONES DE `Libro`</text:p>
      <text:p text:style-name="Standard"/>
      <text:p text:style-name="Standard">**Por qué:** Separar el modelo de BD del modelo de validación para entradas/salidas de la API.</text:p>
      <text:p text:style-name="Standard"/>
      <text:p text:style-name="Standard">**Qué hacer:**</text:p>
      <text:p text:style-name="Standard"/>
      <text:p text:style-name="Standard">- **Archivo (NUEVO): `C:\Cursos\FastAPI\biblioteca_fastapi\schemas.py`** <text:s/></text:p>
      <text:p text:style-name="Standard"><text:s text:c="2"/>👉 Genera el archivo completo `schemas.py` que defina esquemas Pydantic para `Libro`:</text:p>
      <text:p text:style-name="Standard"/>
      <text:p text:style-name="Standard"><text:s text:c="2"/>- `LibroBase`: <text:s/></text:p>
      <text:p text:style-name="Standard"><text:s text:c="4"/>- Campos: `titulo`, `autor`, `rating`.</text:p>
      <text:p text:style-name="Standard"><text:s text:c="4"/>- Validaciones:</text:p>
      <text:p text:style-name="Standard"><text:s text:c="6"/>- `titulo` y `autor` como cadenas no vacías.</text:p>
      <text:p text:style-name="Standard"><text:s text:c="6"/>- `rating` como entero entre 1 y 5.</text:p>
      <text:p text:style-name="Standard"><text:s text:c="2"/>- `LibroCreate` (hereda de `LibroBase` y añade lo necesario para creación).</text:p>
      <text:p text:style-name="Standard"><text:s text:c="2"/>- `LibroUpdate` (permite actualizar campos, explicando si son opcionales o no).</text:p>
      <text:p text:style-name="Standard"><text:s text:c="2"/>- `LibroRead` (incluye campo `id` para respuestas).</text:p>
      <text:p text:style-name="Standard"/>
      <text:p text:style-name="Standard">- Incluir docstrings o comentarios explicando:</text:p>
      <text:p text:style-name="Standard"><text:s text:c="2"/>- Por qué separar `LibroBase`, `LibroCreate`, `LibroUpdate`, `LibroRead`.</text:p>
      <text:p text:style-name="Standard"><text:s text:c="2"/>- Cómo ayuda esto a tener entradas y salidas limpias en la API.</text:p>
      <text:p text:style-name="Standard"><text:soft-page-break/><text:s text:c="2"/>- Usa la ultima version estable de Pydantic al dia de hoy para que no haya codigo deprecado</text:p>
      <text:p text:style-name="Standard"/>
      <text:p text:style-name="Standard">💡 Tips:</text:p>
      <text:p text:style-name="Standard">- Aclarar que el modelo SQLAlchemy (`models.Libro`) es distinto a los esquemas Pydantic.</text:p>
      <text:p text:style-name="Standard"/>
      <text:p text:style-name="Standard">Termina la respuesta con: <text:s/></text:p>
      <text:p text:style-name="Standard">`¿Continuamos? Responde: **listo** para la Fase 6 (capa de servicios / CRUD de libros).`</text:p>
      <text:p text:style-name="Standard"/>
      <text:p text:style-name="Standard"/>
      <text:p text:style-name="Standard">---</text:p>
      <text:p text:style-name="Standard"/>
      <text:p text:style-name="Standard">---</text:p>
      <text:p text:style-name="Standard"/>
      <text:p text:style-name="Standard">### 🧱 FASE 7: CAPA DE SERVICIOS – FUNCIÓN `listar_libros`</text:p>
      <text:p text:style-name="Standard"/>
      <text:p text:style-name="Standard">**Por qué:** Comenzar la capa de servicios con la operación más simple: listar todos los libros.</text:p>
      <text:p text:style-name="Standard"/>
      <text:p text:style-name="Standard">**Qué hacer (explicación general):**</text:p>
      <text:p text:style-name="Standard"/>
      <text:p text:style-name="Standard">En esta fase se creará la carpeta `services` y el archivo `libro_service.py` con solo la función `listar_libros`.</text:p>
      <text:p text:style-name="Standard">No agregues nada mas de las siguientes fases, solo estamos en el caso de listar hasta el momento</text:p>
      <text:p text:style-name="Standard"/>
      <text:p text:style-name="Standard">**Instrucciones:**</text:p>
      <text:p text:style-name="Standard"/>
      <text:p text:style-name="Standard">- Crear la carpeta:</text:p>
      <text:p text:style-name="Standard"/>
      <text:p text:style-name="Standard"><text:s text:c="2"/>- `C:\Cursos\FastAPI\biblioteca_fastapi\services\`</text:p>
      <text:p text:style-name="Standard"/>
      <text:p text:style-name="Standard">- **Archivo (NUEVO): `C:\Cursos\FastAPI\biblioteca_fastapi\services\libro_service.py`** <text:s/></text:p>
      <text:p text:style-name="Standard"><text:s text:c="2"/>👉 Genera el archivo completo `libro_service.py` que, por ahora, incluya:</text:p>
      <text:p text:style-name="Standard"/>
      <text:p text:style-name="Standard"><text:s text:c="2"/>- Importación de la sesión (`Session`) o tipo equivalente.</text:p>
      <text:p text:style-name="Standard"><text:s text:c="2"/>- Importación del modelo `Libro`.</text:p>
      <text:p text:style-name="Standard"><text:s text:c="2"/>- Una función `listar_libros(db)` que:</text:p>
      <text:p text:style-name="Standard"><text:s text:c="4"/>- Reciba la sesión de BD (`db`).</text:p>
      <text:p text:style-name="Standard"><text:s text:c="4"/>- Devuelva la lista completa de registros de la tabla `libros`.</text:p>
      <text:p text:style-name="Standard"><text:s text:c="2"/>- Comentarios explicando:</text:p>
      <text:p text:style-name="Standard"><text:s text:c="4"/>- Qué representa la función.</text:p>
      <text:p text:style-name="Standard"><text:s text:c="4"/>- Por qué se separa en una capa de servicios.</text:p>
      <text:p text:style-name="Standard"/>
      <text:p text:style-name="Standard">💡 Tips:</text:p>
      <text:p text:style-name="Standard">- Explicar que en fases posteriores se irán agregando más funciones a este mismo archivo (crear, obtener por id, actualizar, eliminar).</text:p>
      <text:p text:style-name="Standard"/>
      <text:p text:style-name="Standard">Termina la respuesta con: <text:s/></text:p>
      <text:p text:style-name="Standard">`¿Continuamos? Responde: **listo** para la Fase 8 (router de libros – endpoint GET para listar).`</text:p>
      <text:p text:style-name="Standard"/>
      <text:p text:style-name="Standard"/>
      <text:p text:style-name="Standard">---</text:p>
      <text:p text:style-name="Standard"/>
      <text:p text:style-name="Standard">### 🌐 FASE 8: ROUTER DE LIBROS – ENDPOINT `GET /api/libros` (LISTAR)</text:p>
      <text:p text:style-name="Standard"><text:soft-page-break/></text:p>
      <text:p text:style-name="Standard">**Por qué:** Exponer el primer endpoint REST usando el servicio `listar_libros`.</text:p>
      <text:p text:style-name="Standard"/>
      <text:p text:style-name="Standard">**Qué hacer (explicación general):**</text:p>
      <text:p text:style-name="Standard"/>
      <text:p text:style-name="Standard">En esta fase se crearán la carpeta `api` y el archivo `libros.py` con un router que solo expondrá el listado de libros.</text:p>
      <text:p text:style-name="Standard"/>
      <text:p text:style-name="Standard">**Instrucciones:**</text:p>
      <text:p text:style-name="Standard"/>
      <text:p text:style-name="Standard">- Crear carpeta:</text:p>
      <text:p text:style-name="Standard"/>
      <text:p text:style-name="Standard"><text:s text:c="2"/>- `C:\Cursos\FastAPI\biblioteca_fastapi\api\`</text:p>
      <text:p text:style-name="Standard"/>
      <text:p text:style-name="Standard">- **Archivo (NUEVO): `C:\Cursos\FastAPI\biblioteca_fastapi\api\libros.py`** <text:s/></text:p>
      <text:p text:style-name="Standard"><text:s text:c="2"/>👉 Generar el archivo completo `libros.py` que:</text:p>
      <text:p text:style-name="Standard"/>
      <text:p text:style-name="Standard"><text:s text:c="2"/>- Cree un `APIRouter` con prefijo `/api/libros` y `tags=["Libros"]`.</text:p>
      <text:p text:style-name="Standard"><text:s text:c="2"/>- Defina solo el endpoint:</text:p>
      <text:p text:style-name="Standard"><text:s text:c="4"/>- `GET /api/libros` → lista todos los libros usando `listar_libros`.</text:p>
      <text:p text:style-name="Standard"><text:s text:c="2"/>- Use `Depends(get_db)` para inyectar la sesión.</text:p>
      <text:p text:style-name="Standard"><text:s text:c="2"/>- Use `response_model` adecuado (`List[LibroRead]`).</text:p>
      <text:p text:style-name="Standard"><text:s text:c="2"/>- Maneje la conversión de modelos a esquemas de respuesta.</text:p>
      <text:p text:style-name="Standard"><text:s text:c="2"/>- Incluya comentarios explicando la ruta.</text:p>
      <text:p text:style-name="Standard"/>
      <text:p text:style-name="Standard">- **Archivo (MODIFICADO): `C:\Cursos\FastAPI\biblioteca_fastapi\main.py`** <text:s/></text:p>
      <text:p text:style-name="Standard"><text:s text:c="2"/>👉 Actualizar `main.py` (marcando solo las líneas nuevas como `# [NUEVO]`) para:</text:p>
      <text:p text:style-name="Standard"/>
      <text:p text:style-name="Standard"><text:s text:c="2"/>- Importar el router de libros.</text:p>
      <text:p text:style-name="Standard"><text:s text:c="2"/>- Incluir el router en la aplicación (`app.include_router(...)`).</text:p>
      <text:p text:style-name="Standard"><text:s text:c="2"/>- Mantener el endpoint de prueba inicial.</text:p>
      <text:p text:style-name="Standard"/>
      <text:p text:style-name="Standard">💡 Tips:</text:p>
      <text:p text:style-name="Standard">- Explicar brevemente qué es un `APIRouter` y por qué facilita la organización de rutas.</text:p>
      <text:p text:style-name="Standard"/>
      <text:p text:style-name="Standard">Termina la respuesta con: <text:s/></text:p>
      <text:p text:style-name="Standard">`¿Continuamos? Responde: **listo** para la Fase 9 (pruebas con Postman del listado de libros).`</text:p>
      <text:p text:style-name="Standard"/>
      <text:p text:style-name="Standard"/>
      <text:p text:style-name="Standard">---</text:p>
      <text:p text:style-name="Standard"/>
      <text:p text:style-name="Standard">### 🧪 FASE 9: PRUEBAS CON POSTMAN – LISTAR LIBROS</text:p>
      <text:p text:style-name="Standard"/>
      <text:p text:style-name="Standard">**Por qué:** Validar el correcto funcionamiento del primer endpoint del CRUD.</text:p>
      <text:p text:style-name="Standard"/>
      <text:p text:style-name="Standard">**Qué hacer (explicación general):**</text:p>
      <text:p text:style-name="Standard"/>
      <text:p text:style-name="Standard">En esta fase solo se realizarán pruebas del endpoint de listado de libros; no se modificará el código (salvo ajustes necesarios si se detecta un error).</text:p>
      <text:p text:style-name="Standard"/>
      <text:p text:style-name="Standard">**Instrucciones:**</text:p>
      <text:p text:style-name="Standard"/>
      <text:p text:style-name="Standard"><text:soft-page-break/>- Generar un SQL para Insertar **3 libros** de ejemplo en MySQL Workbench (solo el SQL directo).</text:p>
      <text:p text:style-name="Standard"/>
      <text:p text:style-name="Standard">- Explicar cómo levantar la API con `uvicorn` (puerto por defecto 8000).</text:p>
      <text:p text:style-name="Standard"/>
      <text:p text:style-name="Standard">- Indicar cómo probar en Postman:</text:p>
      <text:p text:style-name="Standard"/>
      <text:p text:style-name="Standard"><text:s text:c="2"/>- Método: `GET`</text:p>
      <text:p text:style-name="Standard"><text:s text:c="2"/>- URL: `http://localhost:8000/api/libros`</text:p>
      <text:p text:style-name="Standard"><text:s text:c="2"/>- Comportamiento esperado:</text:p>
      <text:p text:style-name="Standard"><text:s text:c="4"/>- Lista vacía si no hay datos.</text:p>
      <text:p text:style-name="Standard"><text:s text:c="4"/>- Estructura JSON acorde al esquema `LibroRead`.</text:p>
      <text:p text:style-name="Standard"/>
      <text:p text:style-name="Standard">- Explicar cómo consultar la documentación automática en `/docs` y verificar la descripción del endpoint.</text:p>
      <text:p text:style-name="Standard"/>
      <text:p text:style-name="Standard">- Si detectas algún error típico (por ejemplo, import faltante), indicar la corrección como un pequeño ajuste marcando el archivo correspondiente como (MODIFICADO).</text:p>
      <text:p text:style-name="Standard"/>
      <text:p text:style-name="Standard">💡 Tips:</text:p>
      <text:p text:style-name="Standard">- Recalcar la importancia de probar cada operación tan pronto se implementa, antes de seguir con las siguientes fases.</text:p>
      <text:p text:style-name="Standard"/>
      <text:p text:style-name="Standard">Termina la respuesta con: <text:s/></text:p>
      <text:p text:style-name="Standard">`¿Continuamos? Responde: **listo** para la Fase 10 (capa de servicios: crear libro).`</text:p>
      <text:p text:style-name="Standard"/>
      <text:p text:style-name="Standard"/>
      <text:p text:style-name="Standard">---</text:p>
      <text:p text:style-name="Standard"/>
      <text:p text:style-name="Standard">### 🧱 FASE 10: CAPA DE SERVICIOS – FUNCIÓN `crear_libro`</text:p>
      <text:p text:style-name="Standard"/>
      <text:p text:style-name="Standard">**Por qué:** Agregar la operación de creación de libros a la capa de servicios.</text:p>
      <text:p text:style-name="Standard"/>
      <text:p text:style-name="Standard">**Qué hacer (explicación general):**</text:p>
      <text:p text:style-name="Standard"/>
      <text:p text:style-name="Standard">En esta fase se ampliará `libro_service.py` para incluir la función `crear_libro`, manteniendo el archivo completo actualizado.</text:p>
      <text:p text:style-name="Standard"/>
      <text:p text:style-name="Standard">**Instrucciones:**</text:p>
      <text:p text:style-name="Standard"/>
      <text:p text:style-name="Standard">- **Archivo (MODIFICADO): `C:\Cursos\FastAPI\biblioteca_fastapi\services\libro_service.py`** <text:s/></text:p>
      <text:p text:style-name="Standard"><text:s text:c="2"/>👉 Regenerar el archivo completo `libro_service.py` (no solo fragmentos) que ahora incluya:</text:p>
      <text:p text:style-name="Standard"/>
      <text:p text:style-name="Standard"><text:s text:c="2"/>- La función existente `listar_libros`.</text:p>
      <text:p text:style-name="Standard"><text:s text:c="2"/>- Una nueva función `crear_libro(db, datos: LibroCreate)` que:</text:p>
      <text:p text:style-name="Standard"><text:s text:c="4"/>- Cree una instancia de `Libro` a partir de los datos del esquema.</text:p>
      <text:p text:style-name="Standard"><text:s text:c="4"/>- Guarde el registro en la BD.</text:p>
      <text:p text:style-name="Standard"><text:s text:c="4"/>- Devuelva el objeto persistido.</text:p>
      <text:p text:style-name="Standard"><text:s text:c="2"/>- Comentarios explicando el flujo de creación.</text:p>
      <text:p text:style-name="Standard"/>
      <text:p text:style-name="Standard">- Marcar con `# [NUEVO]` únicamente las líneas nuevas dentro del archivo ya existente.</text:p>
      <text:p text:style-name="Standard"/>
      <text:p text:style-name="Standard"><text:soft-page-break/>💡 Tips:</text:p>
      <text:p text:style-name="Standard">- Explicar brevemente cómo se traducen los datos de Pydantic al modelo SQLAlchemy.</text:p>
      <text:p text:style-name="Standard"/>
      <text:p text:style-name="Standard">Termina la respuesta con: <text:s/></text:p>
      <text:p text:style-name="Standard">`¿Continuamos? Responde: **listo** para la Fase 11 (router: endpoint POST /api/libros).`</text:p>
      <text:p text:style-name="Standard"/>
      <text:p text:style-name="Standard"/>
      <text:p text:style-name="Standard">---</text:p>
      <text:p text:style-name="Standard"/>
      <text:p text:style-name="Standard">### 🌐 FASE 11: ROUTER DE LIBROS – ENDPOINT `POST /api/libros` (CREAR)</text:p>
      <text:p text:style-name="Standard"/>
      <text:p text:style-name="Standard">**Por qué:** Permitir la creación de nuevos libros desde la API.</text:p>
      <text:p text:style-name="Standard"/>
      <text:p text:style-name="Standard">**Qué hacer (explicación general):**</text:p>
      <text:p text:style-name="Standard"/>
      <text:p text:style-name="Standard">En esta fase se ampliará el router `libros.py` para incluir el endpoint de creación de libros.</text:p>
      <text:p text:style-name="Standard"/>
      <text:p text:style-name="Standard">**Instrucciones:**</text:p>
      <text:p text:style-name="Standard"/>
      <text:p text:style-name="Standard">- **Archivo (MODIFICADO): `C:\Cursos\FastAPI\biblioteca_fastapi\api\libros.py`** <text:s/></text:p>
      <text:p text:style-name="Standard"><text:s text:c="2"/>👉 Regenerar el archivo completo `libros.py` que ahora incluya:</text:p>
      <text:p text:style-name="Standard"/>
      <text:p text:style-name="Standard"><text:s text:c="2"/>- El endpoint `GET /api/libros` existente.</text:p>
      <text:p text:style-name="Standard"><text:s text:c="2"/>- Un nuevo endpoint `POST /api/libros` que:</text:p>
      <text:p text:style-name="Standard"><text:s text:c="4"/>- Reciba un cuerpo tipo `LibroCreate`.</text:p>
      <text:p text:style-name="Standard"><text:s text:c="4"/>- Llame a `crear_libro` en la capa de servicios.</text:p>
      <text:p text:style-name="Standard"><text:s text:c="4"/>- Devuelva un `LibroRead`.</text:p>
      <text:p text:style-name="Standard"><text:s text:c="4"/>- Use el código de estado HTTP apropiado (por ejemplo, 201).</text:p>
      <text:p text:style-name="Standard"/>
      <text:p text:style-name="Standard">- Marcar con `# [NUEVO]` solo las partes nuevas en este archivo.</text:p>
      <text:p text:style-name="Standard"/>
      <text:p text:style-name="Standard">💡 Tips:</text:p>
      <text:p text:style-name="Standard">- Explicar brevemente la diferencia entre datos de entrada (request body) y datos de salida (response_model).</text:p>
      <text:p text:style-name="Standard"/>
      <text:p text:style-name="Standard">Termina la respuesta con: <text:s/></text:p>
      <text:p text:style-name="Standard">`¿Continuamos? Responde: **listo** para la Fase 12 (pruebas con Postman – crear libro).`</text:p>
      <text:p text:style-name="Standard"/>
      <text:p text:style-name="Standard"/>
      <text:p text:style-name="Standard">---</text:p>
      <text:p text:style-name="Standard"/>
      <text:p text:style-name="Standard">### 🧪 FASE 12: PRUEBAS CON POSTMAN – CREAR LIBRO</text:p>
      <text:p text:style-name="Standard"/>
      <text:p text:style-name="Standard">**Por qué:** Validar que la creación de libros funciona correctamente.</text:p>
      <text:p text:style-name="Standard"/>
      <text:p text:style-name="Standard">**Qué hacer (explicación general):**</text:p>
      <text:p text:style-name="Standard"/>
      <text:p text:style-name="Standard">En esta fase se probará el endpoint `POST /api/libros` y se verificará el comportamiento completo.</text:p>
      <text:p text:style-name="Standard"/>
      <text:p text:style-name="Standard">**Instrucciones:**</text:p>
      <text:p text:style-name="Standard"/>
      <text:p text:style-name="Standard">- Mostrar cómo enviar una solicitud `POST` en Postman:</text:p>
      <text:p text:style-name="Standard"><text:soft-page-break/></text:p>
      <text:p text:style-name="Standard"><text:s text:c="2"/>- URL: `http://localhost:8000/api/libros`</text:p>
      <text:p text:style-name="Standard"><text:s text:c="2"/>- Body (JSON de ejemplo con rating válido).</text:p>
      <text:p text:style-name="Standard"><text:s text:c="2"/>- Explicar la respuesta esperada.</text:p>
      <text:p text:style-name="Standard"/>
      <text:p text:style-name="Standard">- Volver a probar `GET /api/libros` y confirmar que ahora se ve el nuevo registro.</text:p>
      <text:p text:style-name="Standard"/>
      <text:p text:style-name="Standard">- Verificar en `/docs` la documentación del endpoint `POST`.</text:p>
      <text:p text:style-name="Standard"/>
      <text:p text:style-name="Standard">💡 Tips:</text:p>
      <text:p text:style-name="Standard">- Probar también casos inválidos (rating fuera de rango) y describir brevemente el comportamiento esperado (errores de validación).</text:p>
      <text:p text:style-name="Standard"/>
      <text:p text:style-name="Standard">Termina la respuesta con: <text:s/></text:p>
      <text:p text:style-name="Standard">`¿Continuamos? Responde: **listo** para la Fase 13 (capa de servicios: obtener libro por id).`</text:p>
      <text:p text:style-name="Standard"/>
      <text:p text:style-name="Standard"/>
      <text:p text:style-name="Standard">---</text:p>
      <text:p text:style-name="Standard"/>
      <text:p text:style-name="Standard">### 🧱 FASE 13: CAPA DE SERVICIOS – FUNCIÓN `obtener_libro_por_id`</text:p>
      <text:p text:style-name="Standard"/>
      <text:p text:style-name="Standard">**Por qué:** Permitir la consulta individual de un libro.</text:p>
      <text:p text:style-name="Standard"/>
      <text:p text:style-name="Standard">**Qué hacer (explicación general):**</text:p>
      <text:p text:style-name="Standard"/>
      <text:p text:style-name="Standard">Se ampliará `libro_service.py` para incluir `obtener_libro_por_id`.</text:p>
      <text:p text:style-name="Standard"/>
      <text:p text:style-name="Standard">**Instrucciones:**</text:p>
      <text:p text:style-name="Standard"/>
      <text:p text:style-name="Standard">- **Archivo (MODIFICADO): `C:\Cursos\FastAPI\biblioteca_fastapi\services\libro_service.py`** <text:s/></text:p>
      <text:p text:style-name="Standard"><text:s text:c="2"/>👉 Regenerar el archivo completo con:</text:p>
      <text:p text:style-name="Standard"/>
      <text:p text:style-name="Standard"><text:s text:c="2"/>- `listar_libros`</text:p>
      <text:p text:style-name="Standard"><text:s text:c="2"/>- `crear_libro`</text:p>
      <text:p text:style-name="Standard"><text:s text:c="2"/>- Nueva función `obtener_libro_por_id(db, id: int)` que:</text:p>
      <text:p text:style-name="Standard"><text:s text:c="4"/>- Busque un libro por su id.</text:p>
      <text:p text:style-name="Standard"><text:s text:c="4"/>- Devuelva el libro o `None` si no existe.</text:p>
      <text:p text:style-name="Standard"><text:s text:c="2"/>- Comentarios explicando el uso.</text:p>
      <text:p text:style-name="Standard"/>
      <text:p text:style-name="Standard">- Marcar como `# [NUEVO]` la nueva función.</text:p>
      <text:p text:style-name="Standard"/>
      <text:p text:style-name="Standard">💡 Tips:</text:p>
      <text:p text:style-name="Standard">- Explicar brevemente cómo manejar el caso “no encontrado” desde la capa de servicios.</text:p>
      <text:p text:style-name="Standard"/>
      <text:p text:style-name="Standard">Termina la respuesta con: <text:s/></text:p>
      <text:p text:style-name="Standard">`¿Continuamos? Responde: **listo** para la Fase 14 (router: endpoint GET /api/libros/{id}).`</text:p>
      <text:p text:style-name="Standard"/>
      <text:p text:style-name="Standard"/>
      <text:p text:style-name="Standard">---</text:p>
      <text:p text:style-name="Standard"/>
      <text:p text:style-name="Standard">### 🌐 FASE 14: ROUTER DE LIBROS – ENDPOINT `GET /api/libros/{id}`</text:p>
      <text:p text:style-name="Standard"/>
      <text:p text:style-name="Standard"><text:soft-page-break/>**Por qué:** Exponer la consulta de un libro específico por su identificador.</text:p>
      <text:p text:style-name="Standard"/>
      <text:p text:style-name="Standard">**Qué hacer (explicación general):**</text:p>
      <text:p text:style-name="Standard"/>
      <text:p text:style-name="Standard">Se ampliará el router `libros.py` con `GET /api/libros/{id}`.</text:p>
      <text:p text:style-name="Standard"/>
      <text:p text:style-name="Standard">**Instrucciones:**</text:p>
      <text:p text:style-name="Standard"/>
      <text:p text:style-name="Standard">- **Archivo (MODIFICADO): `C:\Cursos\FastAPI\biblioteca_fastapi\api\libros.py`** <text:s/></text:p>
      <text:p text:style-name="Standard"><text:s text:c="2"/>👉 Regenerar el archivo completo con:</text:p>
      <text:p text:style-name="Standard"/>
      <text:p text:style-name="Standard"><text:s text:c="2"/>- `GET /api/libros`</text:p>
      <text:p text:style-name="Standard"><text:s text:c="2"/>- `POST /api/libros`</text:p>
      <text:p text:style-name="Standard"><text:s text:c="2"/>- Nuevo endpoint `GET /api/libros/{id}` que:</text:p>
      <text:p text:style-name="Standard"><text:s text:c="4"/>- Use `Path` o similar para el parámetro `id`.</text:p>
      <text:p text:style-name="Standard"><text:s text:c="4"/>- Llame a `obtener_libro_por_id`.</text:p>
      <text:p text:style-name="Standard"><text:s text:c="4"/>- Lance `HTTPException(status_code=404, ...)` si el libro no existe.</text:p>
      <text:p text:style-name="Standard"><text:s text:c="4"/>- Devuelva un `LibroRead` cuando se encuentra.</text:p>
      <text:p text:style-name="Standard"/>
      <text:p text:style-name="Standard">- Usar `# [NUEVO]` solo en lo añadido.</text:p>
      <text:p text:style-name="Standard"/>
      <text:p text:style-name="Standard">💡 Tips:</text:p>
      <text:p text:style-name="Standard">- Comentar brevemente cómo manejar errores HTTP con `HTTPException`.</text:p>
      <text:p text:style-name="Standard"/>
      <text:p text:style-name="Standard">Termina la respuesta con: <text:s/></text:p>
      <text:p text:style-name="Standard">`¿Continuamos? Responde: **listo** para la Fase 15 (pruebas con Postman – obtener libro por id).`</text:p>
      <text:p text:style-name="Standard"/>
      <text:p text:style-name="Standard"/>
      <text:p text:style-name="Standard">---</text:p>
      <text:p text:style-name="Standard"/>
      <text:p text:style-name="Standard">### 🧪 FASE 15: PRUEBAS CON POSTMAN – OBTENER LIBRO POR ID</text:p>
      <text:p text:style-name="Standard"/>
      <text:p text:style-name="Standard">**Por qué:** Confirmar que la consulta individual funciona.</text:p>
      <text:p text:style-name="Standard"/>
      <text:p text:style-name="Standard">**Qué hacer (explicación general):**</text:p>
      <text:p text:style-name="Standard"/>
      <text:p text:style-name="Standard">Se probará `GET /api/libros/{id}` con ids válidos e inválidos.</text:p>
      <text:p text:style-name="Standard"/>
      <text:p text:style-name="Standard">**Instrucciones:**</text:p>
      <text:p text:style-name="Standard"/>
      <text:p text:style-name="Standard">- Probar en Postman:</text:p>
      <text:p text:style-name="Standard"/>
      <text:p text:style-name="Standard"><text:s text:c="2"/>- `GET http://localhost:8000/api/libros/1` (o el id que exista).</text:p>
      <text:p text:style-name="Standard"><text:s text:c="2"/>- Probar un id inexistente y verificar el error 404.</text:p>
      <text:p text:style-name="Standard"/>
      <text:p text:style-name="Standard">- Revisar `/docs` para ver el detalle del endpoint y su esquema de respuesta.</text:p>
      <text:p text:style-name="Standard"/>
      <text:p text:style-name="Standard">💡 Tips:</text:p>
      <text:p text:style-name="Standard">- Señalar la importancia de devolver 404 cuando el recurso no existe.</text:p>
      <text:p text:style-name="Standard"/>
      <text:p text:style-name="Standard">Termina la respuesta con: <text:s/></text:p>
      <text:p text:style-name="Standard">`¿Continuamos? Responde: **listo** para la Fase 16 (capa de servicios: actualizar libro).`</text:p>
      <text:p text:style-name="Standard"><text:soft-page-break/></text:p>
      <text:p text:style-name="Standard"/>
      <text:p text:style-name="Standard">---</text:p>
      <text:p text:style-name="Standard"/>
      <text:p text:style-name="Standard">### 🧱 FASE 16: CAPA DE SERVICIOS – FUNCIÓN `actualizar_libro`</text:p>
      <text:p text:style-name="Standard"/>
      <text:p text:style-name="Standard">**Por qué:** Añadir capacidad de modificación de libros existentes.</text:p>
      <text:p text:style-name="Standard"/>
      <text:p text:style-name="Standard">**Qué hacer (explicación general):**</text:p>
      <text:p text:style-name="Standard"/>
      <text:p text:style-name="Standard">Se agregará la función `actualizar_libro` a `libro_service.py`.</text:p>
      <text:p text:style-name="Standard"/>
      <text:p text:style-name="Standard">**Instrucciones:**</text:p>
      <text:p text:style-name="Standard"/>
      <text:p text:style-name="Standard">- **Archivo (MODIFICADO): `C:\Cursos\FastAPI\biblioteca_fastapi\services\libro_service.py`** <text:s/></text:p>
      <text:p text:style-name="Standard"><text:s text:c="2"/>👉 Regenerar el archivo completo con:</text:p>
      <text:p text:style-name="Standard"/>
      <text:p text:style-name="Standard"><text:s text:c="2"/>- `listar_libros`</text:p>
      <text:p text:style-name="Standard"><text:s text:c="2"/>- `crear_libro`</text:p>
      <text:p text:style-name="Standard"><text:s text:c="2"/>- `obtener_libro_por_id`</text:p>
      <text:p text:style-name="Standard"><text:s text:c="2"/>- Nueva función `actualizar_libro(db, id: int, datos: LibroUpdate)` que:</text:p>
      <text:p text:style-name="Standard"><text:s text:c="4"/>- Localice el libro.</text:p>
      <text:p text:style-name="Standard"><text:s text:c="4"/>- Aplique los cambios recibidos.</text:p>
      <text:p text:style-name="Standard"><text:s text:c="4"/>- Maneje el caso de libro no encontrado (por ejemplo devolviendo `None` o levantando una excepción que luego trate el router).</text:p>
      <text:p text:style-name="Standard"><text:s text:c="2"/>- Comentarios explicando los pasos.</text:p>
      <text:p text:style-name="Standard"/>
      <text:p text:style-name="Standard">- Marcar las partes nuevas con `# [NUEVO]`.</text:p>
      <text:p text:style-name="Standard"/>
      <text:p text:style-name="Standard">💡 Tips:</text:p>
      <text:p text:style-name="Standard">- Explicar la diferencia entre actualización total vs. parcial (incluso si aquí se implementa solo una de ellas).</text:p>
      <text:p text:style-name="Standard"/>
      <text:p text:style-name="Standard">Termina la respuesta con: <text:s/></text:p>
      <text:p text:style-name="Standard">`¿Continuamos? Responde: **listo** para la Fase 17 (router: endpoint PUT /api/libros/{id}).`</text:p>
      <text:p text:style-name="Standard"/>
      <text:p text:style-name="Standard"/>
      <text:p text:style-name="Standard">---</text:p>
      <text:p text:style-name="Standard"/>
      <text:p text:style-name="Standard">### 🌐 FASE 17: ROUTER DE LIBROS – ENDPOINT `PUT /api/libros/{id}`</text:p>
      <text:p text:style-name="Standard"/>
      <text:p text:style-name="Standard">**Por qué:** Exponer la operación de actualización de libros.</text:p>
      <text:p text:style-name="Standard"/>
      <text:p text:style-name="Standard">**Qué hacer (explicación general):**</text:p>
      <text:p text:style-name="Standard"/>
      <text:p text:style-name="Standard">Se añadirá `PUT /api/libros/{id}` al router `libros.py`.</text:p>
      <text:p text:style-name="Standard"/>
      <text:p text:style-name="Standard">**Instrucciones:**</text:p>
      <text:p text:style-name="Standard"/>
      <text:p text:style-name="Standard">- **Archivo (MODIFICADO): `C:\Cursos\FastAPI\biblioteca_fastapi\api\libros.py`** <text:s/></text:p>
      <text:p text:style-name="Standard"><text:s text:c="2"/>👉 Regenerar el archivo completo con:</text:p>
      <text:p text:style-name="Standard"/>
      <text:p text:style-name="Standard"><text:soft-page-break/><text:s text:c="2"/>- `GET /api/libros`</text:p>
      <text:p text:style-name="Standard"><text:s text:c="2"/>- `POST /api/libros`</text:p>
      <text:p text:style-name="Standard"><text:s text:c="2"/>- `GET /api/libros/{id}`</text:p>
      <text:p text:style-name="Standard"><text:s text:c="2"/>- Nuevo endpoint `PUT /api/libros/{id}` que:</text:p>
      <text:p text:style-name="Standard"><text:s text:c="4"/>- Reciba un cuerpo `LibroUpdate`.</text:p>
      <text:p text:style-name="Standard"><text:s text:c="4"/>- Llame a `actualizar_libro`.</text:p>
      <text:p text:style-name="Standard"><text:s text:c="4"/>- Devuelva error 404 si el libro no existe.</text:p>
      <text:p text:style-name="Standard"><text:s text:c="4"/>- Devuelva `LibroRead` con los datos actualizados.</text:p>
      <text:p text:style-name="Standard"/>
      <text:p text:style-name="Standard">- Marcar el código nuevo con `# [NUEVO]`.</text:p>
      <text:p text:style-name="Standard"/>
      <text:p text:style-name="Standard">💡 Tips:</text:p>
      <text:p text:style-name="Standard">- Señalar la importancia de devolver el recurso actualizado en la respuesta.</text:p>
      <text:p text:style-name="Standard"/>
      <text:p text:style-name="Standard">Termina la respuesta con: <text:s/></text:p>
      <text:p text:style-name="Standard">`¿Continuamos? Responde: **listo** para la Fase 18 (pruebas con Postman – actualizar libro).`</text:p>
      <text:p text:style-name="Standard"/>
      <text:p text:style-name="Standard"/>
      <text:p text:style-name="Standard">---</text:p>
      <text:p text:style-name="Standard"/>
      <text:p text:style-name="Standard">### 🧪 FASE 18: PRUEBAS CON POSTMAN – ACTUALIZAR LIBRO</text:p>
      <text:p text:style-name="Standard"/>
      <text:p text:style-name="Standard">**Por qué:** Confirmar que las actualizaciones se aplican correctamente.</text:p>
      <text:p text:style-name="Standard"/>
      <text:p text:style-name="Standard">**Qué hacer (explicación general):**</text:p>
      <text:p text:style-name="Standard"/>
      <text:p text:style-name="Standard">Se probará el endpoint `PUT /api/libros/{id}` con datos válidos.</text:p>
      <text:p text:style-name="Standard"/>
      <text:p text:style-name="Standard">**Instrucciones:**</text:p>
      <text:p text:style-name="Standard"/>
      <text:p text:style-name="Standard">- Probar en Postman:</text:p>
      <text:p text:style-name="Standard"/>
      <text:p text:style-name="Standard"><text:s text:c="2"/>- `PUT http://localhost:8000/api/libros/{id}` con un body JSON que modifique algún campo.</text:p>
      <text:p text:style-name="Standard"><text:s text:c="2"/>- Verificar que la respuesta muestre los datos actualizados.</text:p>
      <text:p text:style-name="Standard"><text:s text:c="2"/>- Volver a hacer `GET /api/libros/{id}` para confirmar.</text:p>
      <text:p text:style-name="Standard"/>
      <text:p text:style-name="Standard">💡 Tips:</text:p>
      <text:p text:style-name="Standard">- Probar cambios parciales o completos según cómo se haya definido `LibroUpdate`.</text:p>
      <text:p text:style-name="Standard"/>
      <text:p text:style-name="Standard">Termina la respuesta con: <text:s/></text:p>
      <text:p text:style-name="Standard">`¿Continuamos? Responde: **listo** para la Fase 19 (capa de servicios: eliminar libro).`</text:p>
      <text:p text:style-name="Standard"/>
      <text:p text:style-name="Standard"/>
      <text:p text:style-name="Standard">---</text:p>
      <text:p text:style-name="Standard"/>
      <text:p text:style-name="Standard">### 🧱 FASE 19: CAPA DE SERVICIOS – FUNCIÓN `eliminar_libro`</text:p>
      <text:p text:style-name="Standard"/>
      <text:p text:style-name="Standard">**Por qué:** Completar la capa de servicios con la operación de borrado.</text:p>
      <text:p text:style-name="Standard"/>
      <text:p text:style-name="Standard">**Qué hacer (explicación general):**</text:p>
      <text:p text:style-name="Standard"/>
      <text:p text:style-name="Standard">Se añadirá `eliminar_libro` a `libro_service.py`.</text:p>
      <text:p text:style-name="Standard"><text:soft-page-break/></text:p>
      <text:p text:style-name="Standard">**Instrucciones:**</text:p>
      <text:p text:style-name="Standard"/>
      <text:p text:style-name="Standard">- **Archivo (MODIFICADO): `C:\Cursos\FastAPI\biblioteca_fastapi\services\libro_service.py`** <text:s/></text:p>
      <text:p text:style-name="Standard"><text:s text:c="2"/>👉 Regenerar el archivo completo con:</text:p>
      <text:p text:style-name="Standard"/>
      <text:p text:style-name="Standard"><text:s text:c="2"/>- `listar_libros`</text:p>
      <text:p text:style-name="Standard"><text:s text:c="2"/>- `crear_libro`</text:p>
      <text:p text:style-name="Standard"><text:s text:c="2"/>- `obtener_libro_por_id`</text:p>
      <text:p text:style-name="Standard"><text:s text:c="2"/>- `actualizar_libro`</text:p>
      <text:p text:style-name="Standard"><text:s text:c="2"/>- Nueva función `eliminar_libro(db, id: int)` que:</text:p>
      <text:p text:style-name="Standard"><text:s text:c="4"/>- Busque el libro.</text:p>
      <text:p text:style-name="Standard"><text:s text:c="4"/>- Lo elimine si existe.</text:p>
      <text:p text:style-name="Standard"><text:s text:c="4"/>- Maneje el caso de libro no encontrado.</text:p>
      <text:p text:style-name="Standard"><text:s text:c="2"/>- Comentarios explicando la lógica.</text:p>
      <text:p text:style-name="Standard"/>
      <text:p text:style-name="Standard">- Marcar la nueva función con `# [NUEVO]`.</text:p>
      <text:p text:style-name="Standard"/>
      <text:p text:style-name="Standard">💡 Tips:</text:p>
      <text:p text:style-name="Standard">- Explicar brevemente consideraciones sobre borrados lógicos vs. físicos (aunque aquí se use el borrado físico).</text:p>
      <text:p text:style-name="Standard"/>
      <text:p text:style-name="Standard">Termina la respuesta con: <text:s/></text:p>
      <text:p text:style-name="Standard">`¿Continuamos? Responde: **listo** para la Fase 20 (router: endpoint DELETE /api/libros/{id}).`</text:p>
      <text:p text:style-name="Standard"/>
      <text:p text:style-name="Standard"/>
      <text:p text:style-name="Standard">---</text:p>
      <text:p text:style-name="Standard"/>
      <text:p text:style-name="Standard">### 🌐 FASE 20: ROUTER DE LIBROS – ENDPOINT `DELETE /api/libros/{id}`</text:p>
      <text:p text:style-name="Standard"/>
      <text:p text:style-name="Standard">**Por qué:** Exponer la operación de borrado de libros a través de la API.</text:p>
      <text:p text:style-name="Standard"/>
      <text:p text:style-name="Standard">**Qué hacer (explicación general):**</text:p>
      <text:p text:style-name="Standard"/>
      <text:p text:style-name="Standard">Se añadirá `DELETE /api/libros/{id}` al router `libros.py`.</text:p>
      <text:p text:style-name="Standard"/>
      <text:p text:style-name="Standard">**Instrucciones:**</text:p>
      <text:p text:style-name="Standard"/>
      <text:p text:style-name="Standard">- **Archivo (MODIFICADO): `C:\Cursos\FastAPI\biblioteca_fastapi\api\libros.py`** <text:s/></text:p>
      <text:p text:style-name="Standard"><text:s text:c="2"/>👉 Regenerar el archivo completo con todos los endpoints previos y:</text:p>
      <text:p text:style-name="Standard"/>
      <text:p text:style-name="Standard"><text:s text:c="2"/>- Nuevo endpoint `DELETE /api/libros/{id}` que:</text:p>
      <text:p text:style-name="Standard"><text:s text:c="4"/>- Llame a `eliminar_libro`.</text:p>
      <text:p text:style-name="Standard"><text:s text:c="4"/>- Devuelva error 404 si el libro no existe.</text:p>
      <text:p text:style-name="Standard"><text:s text:c="4"/>- Devuelva un mensaje simple o un código de estado adecuado (por ejemplo, 204 o 200 con mensaje).</text:p>
      <text:p text:style-name="Standard"/>
      <text:p text:style-name="Standard">- Marcar las partes nuevas con `# [NUEVO]`.</text:p>
      <text:p text:style-name="Standard"/>
      <text:p text:style-name="Standard">💡 Tips:</text:p>
      <text:p text:style-name="Standard">- Comentar brevemente las diferencias entre devolver contenido o no en una respuesta de borrado.</text:p>
      <text:p text:style-name="Standard"/>
      <text:p text:style-name="Standard"><text:soft-page-break/>Termina la respuesta con: <text:s/></text:p>
      <text:p text:style-name="Standard">`¿Continuamos? Responde: **listo** para la Fase 21 (pruebas con Postman – eliminar libro).`</text:p>
      <text:p text:style-name="Standard"/>
      <text:p text:style-name="Standard"/>
      <text:p text:style-name="Standard">---</text:p>
      <text:p text:style-name="Standard"/>
      <text:p text:style-name="Standard">### 🧪 FASE 21: PRUEBAS CON POSTMAN – ELIMINAR LIBRO</text:p>
      <text:p text:style-name="Standard"/>
      <text:p text:style-name="Standard">**Por qué:** Confirmar que el borrado funciona correctamente y que la lista se actualiza.</text:p>
      <text:p text:style-name="Standard"/>
      <text:p text:style-name="Standard">**Qué hacer (explicación general):**</text:p>
      <text:p text:style-name="Standard"/>
      <text:p text:style-name="Standard">Se validará el endpoint de borrado, así como su efecto en las consultas de listado y detalle.</text:p>
      <text:p text:style-name="Standard"/>
      <text:p text:style-name="Standard">**Instrucciones:**</text:p>
      <text:p text:style-name="Standard"/>
      <text:p text:style-name="Standard">- Probar en Postman:</text:p>
      <text:p text:style-name="Standard"/>
      <text:p text:style-name="Standard"><text:s text:c="2"/>- `DELETE http://localhost:8000/api/libros/{id}` para un libro existente.</text:p>
      <text:p text:style-name="Standard"><text:s text:c="2"/>- Confirmar la respuesta (mensaje o código de estado).</text:p>
      <text:p text:style-name="Standard"><text:s text:c="2"/>- Repetir `GET /api/libros` para ver que el libro ya no está.</text:p>
      <text:p text:style-name="Standard"><text:s text:c="2"/>- Repetir `GET /api/libros/{id}` para verificar que ahora regresa 404.</text:p>
      <text:p text:style-name="Standard"/>
      <text:p text:style-name="Standard">💡 Tips:</text:p>
      <text:p text:style-name="Standard">- Sugerir una pequeña lista de pruebas manuales: crear varios libros, listarlos, editarlos y luego eliminarlos.</text:p>
      <text:p text:style-name="Standard"/>
      <text:p text:style-name="Standard">Termina la respuesta con: <text:s/></text:p>
      <text:p text:style-name="Standard">`¿Continuamos? Responde: **listo** para la Fase 22 (configuración de CORS).`</text:p>
      <text:p text:style-name="Standard"/>
      <text:p text:style-name="Standard"/>
      <text:p text:style-name="Standard">---</text:p>
      <text:p text:style-name="Standard"/>
      <text:p text:style-name="Standard">### 🔐 FASE 22: CONFIGURACIÓN DE CORS</text:p>
      <text:p text:style-name="Standard"/>
      <text:p text:style-name="Standard">**Por qué:** Permitir que futuros frontends (especialmente React con Vite) consuman la API sin errores de CORS.</text:p>
      <text:p text:style-name="Standard"/>
      <text:p text:style-name="Standard">**Qué hacer (explicación general):**</text:p>
      <text:p text:style-name="Standard"/>
      <text:p text:style-name="Standard">Se configurará el middleware de CORS en `main.py`.</text:p>
      <text:p text:style-name="Standard"/>
      <text:p text:style-name="Standard">**Instrucciones:**</text:p>
      <text:p text:style-name="Standard"/>
      <text:p text:style-name="Standard">- **Archivo (MODIFICADO): `C:\Cursos\FastAPI\biblioteca_fastapi\main.py`** <text:s/></text:p>
      <text:p text:style-name="Standard"><text:s text:c="2"/>👉 Regenerar el archivo completo `main.py` para:</text:p>
      <text:p text:style-name="Standard"/>
      <text:p text:style-name="Standard"><text:s text:c="2"/>- Importar y configurar `CORSMiddleware`.</text:p>
      <text:p text:style-name="Standard"><text:s text:c="2"/>- Agregar `allow_origins` que incluya al menos:</text:p>
      <text:p text:style-name="Standard"><text:s text:c="4"/>- `http://localhost:4200` (Angular)</text:p>
      <text:p text:style-name="Standard"><text:s text:c="4"/>- `http://localhost:5173` (React con Vite)</text:p>
      <text:p text:style-name="Standard"><text:s text:c="2"/>- Configurar `allow_methods`, `allow_headers` y, si aplica, `allow_credentials`.</text:p>
      <text:p text:style-name="Standard"><text:soft-page-break/></text:p>
      <text:p text:style-name="Standard">- Marcar las nuevas secciones con `# [NUEVO]`.</text:p>
      <text:p text:style-name="Standard"/>
      <text:p text:style-name="Standard">- Explicar brevemente:</text:p>
      <text:p text:style-name="Standard"><text:s text:c="2"/>- Qué es CORS.</text:p>
      <text:p text:style-name="Standard"><text:s text:c="2"/>- Por qué se necesita al trabajar con frontends en otros puertos.</text:p>
      <text:p text:style-name="Standard"/>
      <text:p text:style-name="Standard">💡 Tips:</text:p>
      <text:p text:style-name="Standard">- Señalar que, aunque todavía no exista el frontend, la API ya queda preparada para ser consumida.</text:p>
      <text:p text:style-name="Standard"/>
      <text:p text:style-name="Standard">Termina la respuesta con: <text:s/></text:p>
      <text:p text:style-name="Standard">`¿Continuamos? Responde: **listo** para la Fase 23 (pruebas generales en puerto por defecto).`</text:p>
      <text:p text:style-name="Standard"/>
      <text:p text:style-name="Standard"/>
      <text:p text:style-name="Standard">### 🚀 FASE 23: CAMBIO AL PUERTO 8080 Y REPASO FINAL DE PRUEBAS (opcional)</text:p>
      <text:p text:style-name="Standard"/>
      <text:p text:style-name="Standard">**Por qué:** Ajustar la API al puerto de trabajo estandarizado (8080) y confirmar que todo sigue funcionando.</text:p>
      <text:p text:style-name="Standard"/>
      <text:p text:style-name="Standard">**Qué hacer (explicación general):**</text:p>
      <text:p text:style-name="Standard"/>
      <text:p text:style-name="Standard">Se explicará cómo levantar la API en el puerto 8080 y se hará un repaso rápido de las pruebas básicas.</text:p>
      <text:p text:style-name="Standard"/>
      <text:p text:style-name="Standard">**Instrucciones:**</text:p>
      <text:p text:style-name="Standard"/>
      <text:p text:style-name="Standard">- Mostrar cómo ejecutar `uvicorn` de modo que la API quede disponible en:</text:p>
      <text:p text:style-name="Standard"/>
      <text:p text:style-name="Standard"><text:s text:c="2"/>- `http://localhost:8080/`</text:p>
      <text:p text:style-name="Standard"><text:s text:c="2"/>- Documentación: `http://localhost:8080/docs`</text:p>
      <text:p text:style-name="Standard"><text:s text:c="2"/>- API de libros: `http://localhost:8080/api/libros`</text:p>
      <text:p text:style-name="Standard"/>
      <text:p text:style-name="Standard">- Indicar si se usará:</text:p>
      <text:p text:style-name="Standard"/>
      <text:p text:style-name="Standard"><text:s text:c="2"/>- Comando directo en consola (`uvicorn main:app --reload --port 8080`), o</text:p>
      <text:p text:style-name="Standard"><text:s text:c="2"/>- Configuración equivalente en el IDE.</text:p>
      <text:p text:style-name="Standard"/>
      <text:p text:style-name="Standard">- Repetir rápidamente pruebas básicas:</text:p>
      <text:p text:style-name="Standard"/>
      <text:p text:style-name="Standard"><text:s text:c="2"/>- Crear un libro.</text:p>
      <text:p text:style-name="Standard"><text:s text:c="2"/>- Listar libros.</text:p>
      <text:p text:style-name="Standard"><text:s text:c="2"/>- Consultar uno por id.</text:p>
      <text:p text:style-name="Standard"><text:s text:c="2"/>- Actualizarlo.</text:p>
      <text:p text:style-name="Standard"><text:s text:c="2"/>- Eliminarlo.</text:p>
      <text:p text:style-name="Standard"/>
      <text:p text:style-name="Standard">💡 Tips:</text:p>
      <text:p text:style-name="Standard">- Resaltar que la API está lista para ser consumida por un frontend en React (Vite) o Angular sin cambios adicionales en el backend.</text:p>
      <text:p text:style-name="Standard"/>
      <text:p text:style-name="Standard">---</text:p>
      <text:p text:style-name="Standard"/>
      <text:p text:style-name="Standard">✨ MENSAJE FINAL</text:p>
      <text:p text:style-name="Standard"><text:soft-page-break/>----------------</text:p>
      <text:p text:style-name="Standard">Cuando completes la Fase 24, muestra un mensaje de cierre similar a este (adaptado al contexto):</text:p>
      <text:p text:style-name="Standard"/>
      <text:p text:style-name="Standard">&gt; ¡Felicidades! Has construido un **backend REST completo** con **FastAPI** y **MySQL** para tu **Biblioteca Personal** 📚. <text:s/></text:p>
      <text:p text:style-name="Standard">&gt; Aprendiste a:</text:p>
      <text:p text:style-name="Standard">&gt; - Configurar un proyecto FastAPI con entorno virtual y dependencias profesionales. <text:s/></text:p>
      <text:p text:style-name="Standard">&gt; - Modelar la tabla `libros` con SQLAlchemy y mantener el esquema con Alembic. <text:s/></text:p>
      <text:p text:style-name="Standard">&gt; - Diseñar esquemas Pydantic para validaciones y respuestas limpias. <text:s/></text:p>
      <text:p text:style-name="Standard">&gt; - Implementar paso a paso la capa de servicios para el CRUD de libros. <text:s/></text:p>
      <text:p text:style-name="Standard">&gt; - Exponer endpoints REST organizados con `APIRouter`, añadiendo y probando cada operación por separado. <text:s/></text:p>
      <text:p text:style-name="Standard">&gt; - Configurar CORS y ejecutar la API en `http://localhost:8080/api/libros`, lista para ser consumida por un frontend en React (Vite) o Angular.</text:p>
      <text:p text:style-name="Standard"/>
      <text:p text:style-name="Standard">A partir de aquí, el siguiente paso será **construir el frontend en React con Vite** consumiendo esta API, o seguir realizando pruebas avanzadas con Postm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 CARLOS LOBO ARROYO</meta:initial-creator>
    <meta:creation-date>2025-12-30T19:20:01.63</meta:creation-date>
    <meta:document-statistic meta:table-count="0" meta:image-count="0" meta:object-count="0" meta:page-count="19" meta:paragraph-count="598" meta:word-count="4355" meta:character-count="30181"/>
    <dc:date>2025-12-30T19:22:30.47</dc:date>
    <dc:creator>JOSE CARLOS LOBO ARROYO</dc:creator>
    <meta:editing-duration>PT2M31S</meta:editing-duration>
    <meta:editing-cycles>1</meta:editing-cycles>
    <meta:generator>OpenOffice/4.1.15$Win32 OpenOffice.org_project/4115m2$Build-9813</meta:generator>
  </office:meta>
</office:document-meta>
</file>